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620000057A8E9B68AA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T1" style:family="text">
      <style:text-properties fo:font-weight="bold"/>
    </style:style>
    <style:style style:name="T2" style:family="text">
      <style:text-properties style:font-name="Liberation Mono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1" text:anchor-type="char" svg:width="5.3244in" svg:height="6.6535in" draw:z-index="0"><draw:image xlink:href="Pictures/10000000000004620000057A8E9B68AA.png" xlink:type="simple" xlink:show="embed" xlink:actuate="onLoad" draw:mime-type="image/png"/></draw:frame></text:h>
      <text:h text:style-name="P1" text:outline-level="1">Murphy's Bench — What It Does</text:h>
      <text:p text:style-name="Text_20_body"/>
      <text:p text:style-name="Text_20_body">Murphy's Bench is self-hosted repair-shop software for small field-service businesses and MSPs. It runs on your own server, on your own network. You own the data, there's no per-seat SaaS bill, and nothing about your clients leaves your control.</text:p>
      <text:p text:style-name="Text_20_body">This document is for a technician or shop owner sizing it up: <text:span text:style-name="T1">what can it</text:span> <text:span text:style-name="T1">actually do for you day to day.</text:span> It doesn't cover how it's built or how to install it — see <text:span text:style-name="T2">INSTALL.md</text:span> for that.</text:p>
      <text:p text:style-name="Horizontal_20_Line"/>
      <text:h text:style-name="P2" text:outline-level="2"><text:soft-page-break/>The core idea: Ticket → Work Order</text:h>
      <text:p text:style-name="P3"/>
      <text:p text:style-name="Text_20_body">Most repair work follows one shape, and Murphy's Bench is built around it:</text:p>
      <text:p text:style-name="Quotations">A request comes in (a <text:span text:style-name="T1">Ticket</text:span>) → you talk to the customer → it becomes actual repair work (a <text:span text:style-name="T1">Work Order</text:span>) → you do the work and track it → it's done and ready to bill.</text:p>
      <text:p text:style-name="Text_20_body">The two halves are deliberately separate:</text:p>
      <text:list text:style-name="L1">
        <text:list-item>
          <text:p text:style-name="P4">A <text:span text:style-name="T1">Ticket</text:span> is the conversation — the customer-facing thread.</text:p>
        </text:list-item>
        <text:list-item>
          <text:p text:style-name="P4">A <text:span text:style-name="T1">Work Order</text:span> is the job — the bench/onsite work, parts, time, and checklist.</text:p>
        </text:list-item>
      </text:list>
      <text:p text:style-name="Text_20_body">A ticket can become a work order with one click, and the two stay linked so you can always jump between "what the customer was told" and "what was actually done." Crucially, <text:span text:style-name="T1">closing a work order never auto-closes the ticket</text:span> — a human decides the customer interaction is finished. No job quietly falls off the radar.</text:p>
      <text:p text:style-name="Horizontal_20_Line"/>
      <text:h text:style-name="P2" text:outline-level="2">Tickets — the customer conversation</text:h>
      <text:list text:style-name="L2">
        <text:list-item>
          <text:p text:style-name="P5"><text:span text:style-name="T1">Email in, ticket out.</text:span> Emails sent to your support address automatically become tickets. Customer replies thread back into the same ticket.</text:p>
        </text:list-item>
        <text:list-item>
          <text:p text:style-name="P5"><text:span text:style-name="T1">Threaded replies</text:span>, like an email client — staff-to-customer messages, internal notes only your team sees, and inbound customer replies are visually distinct so you always know who said what.</text:p>
        </text:list-item>
        <text:list-item>
          <text:p text:style-name="P5"><text:span text:style-name="T1">One voice to the customer.</text:span> The ticket is the single channel the customer sees. A bench tech who needs the customer contacted messages the ticket owner internally rather than emailing the customer directly — so the customer never gets two people talking at them.</text:p>
        </text:list-item>
        <text:list-item>
          <text:p text:style-name="P5"><text:span text:style-name="T1">HTML email with your branding</text:span> — your logo and colors on outbound mail, with signatures.</text:p>
        </text:list-item>
        <text:list-item>
          <text:p text:style-name="P5"><text:span text:style-name="T1">Auto-responder</text:span> so a customer knows their email was received.</text:p>
        </text:list-item>
        <text:list-item>
          <text:p text:style-name="P5"><text:span text:style-name="T1">Quoted history folds away</text:span> — long email chains collapse so the new message is what you actually read.</text:p>
        </text:list-item>
        <text:list-item>
          <text:p text:style-name="P5"><text:span text:style-name="T1">Status tracking</text:span> (New → Open → In Progress → Waiting on Customer → Resolved → Closed) with colors, and you can define your own custom statuses.</text:p>
        </text:list-item>
        <text:list-item>
          <text:p text:style-name="P5"><text:span text:style-name="T1">Collision avoidance</text:span> — if a teammate already has a ticket open, you're warned before you both step on it.</text:p>
        </text:list-item>
        <text:list-item>
          <text:p text:style-name="P5"><text:span text:style-name="T1">Link related tickets</text:span> together (duplicates, related issues).</text:p>
        </text:list-item>
      </text:list>
      <text:p text:style-name="Horizontal_20_Line"/>
      <text:h text:style-name="P2" text:outline-level="2"><text:soft-page-break/>Work Orders — the actual job</text:h>
      <text:list text:style-name="L3">
        <text:list-item>
          <text:p text:style-name="P6"><text:span text:style-name="T1">In-shop, onsite, or remote</text:span> — each work order knows which, and onsite jobs get mileage tracking.</text:p>
        </text:list-item>
        <text:list-item>
          <text:p text:style-name="P6"><text:span text:style-name="T1">Built-in stopwatch</text:span> to log time as you work, plus quick-entry labor lines.</text:p>
        </text:list-item>
        <text:list-item>
          <text:p text:style-name="P6"><text:span text:style-name="T1">Checklists</text:span> — pre- and post-repair task lists, scoped by device type, so nothing gets skipped.</text:p>
        </text:list-item>
        <text:list-item>
          <text:p text:style-name="P6"><text:span text:style-name="T1">Work Performed log</text:span> — a running, timestamped record of what you did, which becomes the customer's repair report.</text:p>
        </text:list-item>
        <text:list-item>
          <text:p text:style-name="P6"><text:span text:style-name="T1">Printable Repair Report</text:span> — a clean, professional printout with your company info, the device, the work done, and signature lines.</text:p>
        </text:list-item>
        <text:list-item>
          <text:p text:style-name="P6"><text:span text:style-name="T1">Device credentials, encrypted</text:span> — store the login/password/PIN for the machine you're working on, masked by default, with every reveal logged.</text:p>
        </text:list-item>
      </text:list>
      <text:p text:style-name="Horizontal_20_Line"/>
      <text:h text:style-name="P2" text:outline-level="2">Clients, contacts, and devices</text:h>
      <text:p text:style-name="Text_20_body">Everything is organized around the <text:span text:style-name="T1">client</text:span>, the way a shop actually thinks:</text:p>
      <text:list text:style-name="L4">
        <text:list-item>
          <text:p text:style-name="P7">A client has multiple <text:span text:style-name="T1">contacts</text:span> (people), each with multiple phone numbers.</text:p>
        </text:list-item>
        <text:list-item>
          <text:p text:style-name="P7">A client has multiple <text:span text:style-name="T1">devices</text:span>, each with its own repair history.</text:p>
        </text:list-item>
        <text:list-item>
          <text:p text:style-name="P7">Residential vs. business clients are handled differently where it matters.</text:p>
        </text:list-item>
        <text:list-item>
          <text:p text:style-name="P7">From a client's page you see their whole history and can start a new work order for a specific person and device in a couple of clicks.</text:p>
        </text:list-item>
      </text:list>
      <text:p text:style-name="Horizontal_20_Line"/>
      <text:h text:style-name="P2" text:outline-level="2">Knowing where things stand</text:h>
      <text:list text:style-name="L5">
        <text:list-item>
          <text:p text:style-name="P8"><text:span text:style-name="T1">Dashboard</text:span> with color-coded tiles — what's active, what's waiting, what's overdue, what's done — at a glance.</text:p>
        </text:list-item>
        <text:list-item>
          <text:p text:style-name="P8"><text:span text:style-name="T1">Per-technician views</text:span> — techs see their own work plus the unclaimed pool; admins see everything. Techs <text:span text:style-name="T1">claim, transfer, and escalate</text:span>; dispatchers <text:span text:style-name="T1">assign</text:span>.</text:p>
        </text:list-item>
        <text:list-item>
          <text:p text:style-name="P8"><text:span text:style-name="T1">Escalation levels</text:span> — push a ticket up to a more senior tech without losing the current owner, so nothing disappears into a black hole.</text:p>
        </text:list-item>
        <text:list-item>
          <text:p text:style-name="P8"><text:span text:style-name="T1">In-app notifications</text:span> — a sidebar bell tells a tech when a teammate needs something from them.</text:p>
        </text:list-item>
        <text:list-item>
          <text:p text:style-name="P8"><text:span text:style-name="T1">Saved queues</text:span> — build your own filtered views of tickets and reuse them.</text:p>
        </text:list-item>
      </text:list>
      <text:p text:style-name="Horizontal_20_Line"/>
      <text:h text:style-name="P2" text:outline-level="2"><text:soft-page-break/>Deadlines and accountability (SLAs)</text:h>
      <text:list text:style-name="L6">
        <text:list-item>
          <text:p text:style-name="P9"><text:span text:style-name="T1">SLA plans</text:span> set response deadlines per type of work.</text:p>
        </text:list-item>
        <text:list-item>
          <text:p text:style-name="P9">Overdue tickets are flagged, and acknowledging one <text:span text:style-name="T1">requires a note</text:span> — so there's an audit trail of why something slipped, not just that it did.</text:p>
        </text:list-item>
      </text:list>
      <text:p text:style-name="Horizontal_20_Line"/>
      <text:h text:style-name="P2" text:outline-level="2">Billing (lightweight, on purpose)</text:h>
      <text:p text:style-name="Text_20_body">Murphy's Bench tracks billing <text:span text:style-name="T1">state</text:span> — it is not a full accounting package, and it doesn't try to be.</text:p>
      <text:list text:style-name="L7">
        <text:list-item>
          <text:p text:style-name="P10">Each work order has a billing status: uninvoiced, invoiced, paid, paid-direct (cash/walk-in), or disputed.</text:p>
        </text:list-item>
        <text:list-item>
          <text:p text:style-name="P10"><text:span text:style-name="T1">Outstanding balances</text:span> roll up per client.</text:p>
        </text:list-item>
        <text:list-item>
          <text:p text:style-name="P10"><text:span text:style-name="T1">CSV export</text:span> of invoices and billing so it drops into whatever accounting system you already use. (A direct Invoice Ninja bridge is planned.)</text:p>
        </text:list-item>
      </text:list>
      <text:p text:style-name="Horizontal_20_Line"/>
      <text:h text:style-name="P2" text:outline-level="2">Reporting</text:h>
      <text:list text:style-name="L8">
        <text:list-item>
          <text:p text:style-name="P11">A reports page with several built-in reports — workload, technician performance (completion rate, average resolution time), billing summaries, mileage, and more — with charts.</text:p>
        </text:list-item>
        <text:list-item>
          <text:p text:style-name="P11"><text:span text:style-name="T1">Every report exports</text:span> to CSV, print, or PDF.</text:p>
        </text:list-item>
      </text:list>
      <text:p text:style-name="Horizontal_20_Line"/>
      <text:h text:style-name="P2" text:outline-level="2">Knowledge base</text:h>
      <text:list text:style-name="L9">
        <text:list-item>
          <text:p text:style-name="P12">A built-in <text:span text:style-name="T1">KB</text:span> for troubleshooting guides, how-tos, vendor notes, and internal-only articles.</text:p>
        </text:list-item>
        <text:list-item>
          <text:p text:style-name="P12">Articles are written in Markdown and render with proper formatting.</text:p>
        </text:list-item>
        <text:list-item>
          <text:p text:style-name="P12">Some articles can be marked internal/restricted.</text:p>
        </text:list-item>
      </text:list>
      <text:p text:style-name="Horizontal_20_Line"/>
      <text:h text:style-name="P2" text:outline-level="2">Security and access control</text:h>
      <text:list text:style-name="L10">
        <text:list-item>
          <text:p text:style-name="P13"><text:span text:style-name="T1">Multi-factor authentication (TOTP)</text:span> with authenticator apps, backup codes for admins, and admin-driven MFA reset for a lost device.</text:p>
        </text:list-item>
        <text:list-item>
          <text:p text:style-name="P13"><text:span text:style-name="T1">Roles and permissions</text:span> — fine-grained control over who can see and do what (including who may reveal stored credentials).</text:p>
        </text:list-item>
        <text:list-item>
          <text:p text:style-name="P13"><text:span text:style-name="T1">Encrypted credential storage</text:span> for both device and organization-level secrets (Wi-Fi, portal <text:soft-page-break/>logins, etc.), with a full <text:span text:style-name="T1">access log</text:span> — every view of a secret is recorded.</text:p>
        </text:list-item>
        <text:list-item>
          <text:p text:style-name="P13"><text:span text:style-name="T1">Login lockout</text:span> protection against password guessing.</text:p>
        </text:list-item>
        <text:list-item>
          <text:p text:style-name="P13">The whole app is login-only and built to sit behind HTTPS.</text:p>
        </text:list-item>
      </text:list>
      <text:p text:style-name="Horizontal_20_Line"/>
      <text:h text:style-name="P2" text:outline-level="2">Why self-hosted</text:h>
      <text:list text:style-name="L11">
        <text:list-item>
          <text:p text:style-name="P14"><text:span text:style-name="T1">Your data stays yours</text:span> — on your hardware, on your network. Sensitive customer and credential data never sits on someone else's cloud.</text:p>
        </text:list-item>
        <text:list-item>
          <text:p text:style-name="P14"><text:span text:style-name="T1">No per-seat subscription.</text:span> Add techs without adding to a monthly bill.</text:p>
        </text:list-item>
        <text:list-item>
          <text:p text:style-name="P14"><text:span text:style-name="T1">You control updates and uptime.</text:span> Nothing changes under you on a vendor's schedule.</text:p>
        </text:list-item>
        <text:list-item>
          <text:p text:style-name="P14">Accessible securely from anywhere via a <text:span text:style-name="T1">Cloudflare Tunnel</text:span> when you want remote access, without exposing your network.</text:p>
        </text:list-item>
      </text:list>
      <text:p text:style-name="Horizontal_20_Line"/>
      <text:h text:style-name="P2" text:outline-level="2">Honest about where it is</text:h>
      <text:p text:style-name="Text_20_body">Murphy's Bench is in <text:span text:style-name="T1">active daily production use</text:span> at the shop that builds it, and it's being hardened for use by others. It's deliberately scoped: it does ticketing, work orders, devices, mileage, email, credentials, and reporting <text:span text:style-name="T1">well</text:span>, rather than trying to be everything. It is not (yet) a customer self-service portal, a full accounting system, or a multi-tenant SaaS — those are out of scope by choice.</text:p>
      <text:p text:style-name="Text_20_body">If you run a small shop and want repair-tracking software you fully control, this is built for exactly that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6-06-14T20:12:34.466834000</meta:print-date>
    <meta:printed-by>PDF files</meta:printed-by>
    <dc:date>2026-06-14T20:12:45.369969000</dc:date>
    <meta:editing-duration>PT10S</meta:editing-duration>
    <meta:editing-cycles>1</meta:editing-cycles>
    <meta:document-statistic meta:table-count="0" meta:image-count="1" meta:object-count="0" meta:page-count="5" meta:paragraph-count="68" meta:word-count="1116" meta:character-count="6741" meta:non-whitespace-character-count="5707"/>
    <meta:generator>LibreOffice/26.2.2.2$MacOSX_AARCH64 LibreOffice_project/1f77d10d6938fd34972958f64b2bcfa54f8b1ba5</meta:generator>
  </office:meta>
</office:document-meta>
</file>